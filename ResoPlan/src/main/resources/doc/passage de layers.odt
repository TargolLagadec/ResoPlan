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Preformatted_20_Text">
      <style:paragraph-properties fo:margin-top="0cm" fo:margin-bottom="0.247cm" style:contextual-spacing="false" fo:line-height="115%"/>
    </style:style>
    <style:style style:name="P4" style:family="paragraph" style:parent-style-name="Text_20_body">
      <style:paragraph-properties fo:text-align="left" style:justify-single-word="false" style:writing-mode="lr-tb"/>
      <style:text-properties style:text-outline="false" style:text-line-through-style="none" style:text-line-through-type="none" style:font-name="Liberation San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5" style:family="paragraph" style:parent-style-name="Text_20_body">
      <style:text-properties style:font-name="Liberation Sans" fo:font-size="18pt" style:font-size-asian="18pt"/>
    </style:style>
    <style:style style:name="P6" style:family="paragraph" style:parent-style-name="Standard">
      <style:paragraph-properties fo:text-align="left" style:justify-single-word="false" style:writing-mode="lr-tb"/>
      <style:text-properties style:text-outline="false" style:text-line-through-style="none" style:text-line-through-type="none" style:font-name="Liberation San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text-outline="false" style:text-line-through-style="none" style:text-line-through-type="none" style:font-name="Liberation San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La mécanique de pose dans <text:span text:style-name="Source_20_Text">EvacuationsLayer</text:span></text:h>
      <text:p text:style-name="Text_20_body">Au moment du clic sur le calque, la création conjointe des deux nœuds va ressembler à ceci (dans ton gestionnaire de projet ou ton service réseau) :</text:p>
      <text:p text:style-name="P2">Java</text:p>
      <text:p text:style-name="P3"><text:span text:style-name="Source_20_Text">public void placeVerticalTraversal(NodeModel model, double x, double y, Floor currentFloor, VerticalDirection direction) {</text:span></text:p>
      <text:p text:style-name="P3"><text:span text:style-name="Source_20_Text"><text:s text:c="4"/>// 1. Création du nœud sur l'étage actuel</text:span></text:p>
      <text:p text:style-name="P3"><text:span text:style-name="Source_20_Text"><text:s text:c="4"/>Node localNode = new Node(model);</text:span></text:p>
      <text:p text:style-name="P3"><text:span text:style-name="Source_20_Text"><text:s text:c="4"/>localNode.setPosX(x);</text:span></text:p>
      <text:p text:style-name="P3"><text:span text:style-name="Source_20_Text"><text:s text:c="4"/>localNode.setPosY(y);</text:span></text:p>
      <text:p text:style-name="P3"><text:span text:style-name="Source_20_Text"><text:s text:c="4"/>localNode.setDirection(direction);</text:span></text:p>
      <text:p text:style-name="P3"><text:span text:style-name="Source_20_Text"><text:s text:c="4"/></text:span></text:p>
      <text:p text:style-name="P3"><text:span text:style-name="Source_20_Text"><text:s text:c="4"/>// 2. Détermination de l'étage cible et de la direction du jumeau</text:span></text:p>
      <text:p text:style-name="P3"><text:span text:style-name="Source_20_Text"><text:s text:c="4"/>Floor twinFloor = null;</text:span></text:p>
      <text:p text:style-name="P3"><text:span text:style-name="Source_20_Text"><text:s text:c="4"/>VerticalDirection twinDirection = VerticalDirection.NONE;</text:span></text:p>
      <text:p text:style-name="P3"><text:span text:style-name="Source_20_Text"><text:s text:c="4"/></text:span></text:p>
      <text:p text:style-name="P3"><text:span text:style-name="Source_20_Text"><text:s text:c="4"/>if (direction == VerticalDirection.GOES_DOWN) {</text:span></text:p>
      <text:p text:style-name="P3"><text:span text:style-name="Source_20_Text"><text:s text:c="8"/>twinFloor = project.getFloorBelow(currentFloor); // n-1</text:span></text:p>
      <text:p text:style-name="P3"><text:span text:style-name="Source_20_Text"><text:s text:c="8"/>twinDirection = VerticalDirection.GOES_UP;</text:span></text:p>
      <text:p text:style-name="P3"><text:span text:style-name="Source_20_Text"><text:s text:c="4"/>} else if (direction == VerticalDirection.GOES_UP) {</text:span></text:p>
      <text:p text:style-name="P3"><text:span text:style-name="Source_20_Text"><text:s text:c="8"/>twinFloor = project.getFloorAbove(currentFloor); // n+1</text:span></text:p>
      <text:p text:style-name="P3"><text:span text:style-name="Source_20_Text"><text:s text:c="8"/>twinDirection = VerticalDirection.GOES_DOWN;</text:span></text:p>
      <text:p text:style-name="P3"><text:span text:style-name="Source_20_Text"><text:s text:c="4"/>}</text:span></text:p>
      <text:p text:style-name="P3"><text:span text:style-name="Source_20_Text"><text:s text:c="4"/></text:span></text:p>
      <text:p text:style-name="P3"><text:span text:style-name="Source_20_Text"><text:s text:c="4"/>// 3. Si l'étage existe, on crée le jumeau au même endroit</text:span></text:p>
      <text:p text:style-name="P3"><text:span text:style-name="Source_20_Text"><text:s text:c="4"/>if (twinFloor != null) {</text:span></text:p>
      <text:p text:style-name="P3"><text:span text:style-name="Source_20_Text"><text:s text:c="8"/>Node twinNode = new Node(model);</text:span></text:p>
      <text:p text:style-name="P3"><text:span text:style-name="Source_20_Text"><text:s text:c="8"/>twinNode.setPosX(x);</text:span></text:p>
      <text:p text:style-name="P3"><text:span text:style-name="Source_20_Text"><text:s text:c="8"/>twinNode.setPosY(y);</text:span></text:p>
      <text:p text:style-name="P3"><text:span text:style-name="Source_20_Text"><text:s text:c="8"/>twinNode.setDirection(twinDirection);</text:span></text:p>
      <text:p text:style-name="P3"><text:span text:style-name="Source_20_Text"><text:s text:c="8"/></text:span></text:p>
      <text:p text:style-name="P3"><text:span text:style-name="Source_20_Text"><text:s text:c="8"/>// On les lie par ID pour les déplacements futurs</text:span></text:p>
      <text:p text:style-name="P3"><text:span text:style-name="Source_20_Text"><text:s text:c="8"/>localNode.setTwinNodeId(twinNode.getId());</text:span></text:p>
      <text:p text:style-name="P3"><text:span text:style-name="Source_20_Text"><text:s text:c="8"/>twinNode.setTwinNodeId(localNode.getId());</text:span></text:p>
      <text:p text:style-name="P3"><text:span text:style-name="Source_20_Text"><text:s text:c="8"/></text:span></text:p>
      <text:p text:style-name="P3"><text:span text:style-name="Source_20_Text"><text:s text:c="8"/>// On ajoute le jumeau à son étage</text:span></text:p>
      <text:p text:style-name="P3"><text:soft-page-break/><text:span text:style-name="Source_20_Text"><text:s text:c="8"/>twinFloor.addNode(twinNode);</text:span></text:p>
      <text:p text:style-name="P3"><text:span text:style-name="Source_20_Text"><text:s text:c="4"/>}</text:span></text:p>
      <text:p text:style-name="P3"><text:span text:style-name="Source_20_Text"><text:s text:c="4"/></text:span></text:p>
      <text:p text:style-name="P3"><text:span text:style-name="Source_20_Text"><text:s text:c="4"/>// On ajoute le nœud local à l'étage actuel</text:span></text:p>
      <text:p text:style-name="P3"><text:span text:style-name="Source_20_Text"><text:s text:c="4"/>currentFloor.addNode(localNode);</text:span></text:p>
      <text:p text:style-name="P3"><text:span text:style-name="Source_20_Text">}</text:span></text:p>
      <text:p text:style-name="P2"/>
      <text:section text:style-name="Sect1" text:name="f05a744a0749031c">
        <text:section text:style-name="Sect2" text:name="model-response-message-contentr_f05a744a0749031c">
          <text:h text:style-name="Heading_20_2" text:outline-level="2">3. Et pour les liaisons (les tuyaux) ?</text:h>
          <text:p text:style-name="Text_20_body">Tu as dit qu'on verrait ça plus tard, mais le choix du <text:span text:style-name="Source_20_Text">Pane</text:span> valide complètement la stratégie pour la suite.</text:p>
          <text:p text:style-name="Text_20_body">Dans ton <text:span text:style-name="Source_20_Text">Pane</text:span>, les liaisons seront de simples objets <text:span text:style-name="Source_20_Text"><text:span text:style-name="T1">Line</text:span></text:span> ou <text:span text:style-name="Source_20_Text"><text:span text:style-name="T1">CubicCurve</text:span></text:span> (pour des tuyaux courbes) de JavaFX. Tu pourras les ajouter dans <text:span text:style-name="Source_20_Text">this.getChildren()</text:span> <text:span text:style-name="T1">derrière</text:span> les nœuds (pour que les nœuds restent au-dessus).</text:p>
          <text:p text:style-name="Text_20_body">Le truc magique avec JavaFX ? Tu pourras <text:span text:style-name="T1">lier (binder)</text:span> les coordonnées de la ligne aux propriétés de translation de tes <text:span text:style-name="Source_20_Text">GraphicalNode</text:span>. Si l'utilisateur fait un <text:span text:style-name="T2">Drag n' Drop</text:span> sur un nœud pour le déplacer, les tuyaux qui y sont attachés <text:span text:style-name="T1">suivront automatiquement le mouvement en temps réel</text:span>, sans que tu n'aies une seule ligne de calcul à écrire !</text:p>
          <text:p text:style-name="P2">Java</text:p>
          <text:p text:style-name="P3"><text:span text:style-name="Source_20_Text">// Un avant-goût du bonheur des liaisons avec le Binding :</text:span></text:p>
          <text:p text:style-name="P3"><text:span text:style-name="Source_20_Text">Line tuyau = new Line();</text:span></text:p>
          <text:p text:style-name="P3"><text:span text:style-name="Source_20_Text">tuyau.startXProperty().bind(nodeA.translateXProperty());</text:span></text:p>
          <text:p text:style-name="P3"><text:span text:style-name="Source_20_Text">tuyau.startYProperty().bind(nodeA.translateYProperty());</text:span></text:p>
          <text:p text:style-name="P3"><text:span text:style-name="Source_20_Text">tuyau.endXProperty().bind(nodeB.translateXProperty());</text:span></text:p>
          <text:p text:style-name="P3"><text:span text:style-name="Source_20_Text">tuyau.endYProperty().bind(nodeB.translateYProperty());</text:span></text:p>
          <text:p text:style-name="Text_20_body"/>
        </text:section>
      </text:section>
      <text:p text:style-name="P4" loext:marker-style-name="T3">* Zoom : 0.554 </text:p>
      <text:p text:style-name="P5">* ShiftX : -181 </text:p>
      <text:p text:style-name="P5">* ShiftY : 394 </text:p>
      <text:p text:style-name="P6" loext:marker-style-name="T3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5T09:26:38.499944529</meta:creation-date>
    <dc:date>2026-06-27T23:18:08.339102259</dc:date>
    <meta:editing-duration>PT7H14M</meta:editing-duration>
    <meta:editing-cycles>2</meta:editing-cycles>
    <meta:generator>LibreOffice/26.2.3.2$Linux_X86_64 LibreOffice_project/d4d5ed47b6084125f28d269a5650105d54dde034</meta:generator>
    <meta:document-statistic meta:table-count="0" meta:image-count="0" meta:object-count="0" meta:page-count="2" meta:paragraph-count="54" meta:word-count="324" meta:character-count="2623" meta:non-whitespace-character-count="2144"/>
  </office:meta>
</office:document-meta>
</file>